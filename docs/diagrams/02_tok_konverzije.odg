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automatic-styles>
    <style:style style:name="b_in" style:family="graphic">
      <style:graphic-properties draw:fill="solid" draw:fill-color="#eaf1f9" draw:stroke="solid" svg:stroke-width="0.05cm" svg:stroke-color="#4e79a7" draw:textarea-vertical-align="middle"/>
      <style:paragraph-properties fo:text-align="center"/>
      <style:text-properties fo:color="#4e79a7"/>
    </style:style>
    <style:style style:name="b_mid" style:family="graphic">
      <style:graphic-properties draw:fill="solid" draw:fill-color="#fff4e0" draw:stroke="solid" svg:stroke-width="0.05cm" svg:stroke-color="#e8a33d" draw:textarea-vertical-align="middle"/>
      <style:paragraph-properties fo:text-align="center"/>
      <style:text-properties fo:color="#e8a33d"/>
    </style:style>
    <style:style style:name="b_out" style:family="graphic">
      <style:graphic-properties draw:fill="solid" draw:fill-color="#e7f3e9" draw:stroke="solid" svg:stroke-width="0.05cm" svg:stroke-color="#59a14f" draw:textarea-vertical-align="middle"/>
      <style:paragraph-properties fo:text-align="center"/>
      <style:text-properties fo:color="#59a14f"/>
    </style:style>
    <style:style style:name="arr" style:family="graphic">
      <style:graphic-properties draw:stroke="solid" svg:stroke-width="0.06cm" svg:stroke-color="#5b6b7a" draw:marker-end="Arr" draw:marker-end-width="0.25cm" draw:marker-end-center="false"/>
    </style:style>
    <style:style style:name="tit" style:family="graphic">
      <style:graphic-properties draw:fill="none" draw:stroke="none"/>
      <style:paragraph-properties fo:text-align="center"/>
      <style:text-properties fo:font-size="18pt" fo:font-weight="bold" fo:color="#2f3b4c"/>
    </style:style>
    <style:style style:name="lgd" style:family="graphic">
      <style:graphic-properties draw:fill="none" draw:stroke="none"/>
      <style:paragraph-properties fo:text-align="left"/>
      <style:text-properties fo:font-size="10pt" fo:color="#2f3b4c"/>
    </style:style>
    <style:style style:name="tB" style:family="text">
      <style:text-properties fo:font-size="12pt" fo:font-weight="bold"/>
    </style:style>
    <style:style style:name="tS" style:family="text">
      <style:text-properties fo:font-size="9pt" fo:color="#5b6b7a"/>
    </style:style>
  </office:automatic-styles>
  <office:body>
    <office:drawing>
      <draw:page draw:name="tok" draw:master-page-name="Default">
        <draw:frame draw:style-name="tit" svg:x="1cm" svg:y="1cm" svg:width="27.7cm" svg:height="1.1cm">
          <draw:text-box>
            <text:p>Tok konverzije: plugin generiše model, dTwin ga rješava</text:p>
          </draw:text-box>
        </draw:frame>
        <draw:rect draw:style-name="b_in" draw:corner-radius="0.3cm" svg:x="0.80cm" svg:y="8.0cm" svg:width="3.5cm" svg:height="2.5cm">
          <text:p><text:span text:style-name="tB">MATPOWER</text:span></text:p>
          <text:p><text:span text:style-name="tS">.m datoteka</text:span></text:p>
        </draw:rect>
        <draw:line draw:style-name="arr" svg:x1="4.30cm" svg:y1="9.25cm" svg:x2="4.83cm" svg:y2="9.25cm"/>
        <draw:rect draw:style-name="b_in" draw:corner-radius="0.3cm" svg:x="4.83cm" svg:y="8.0cm" svg:width="3.5cm" svg:height="2.5cm">
          <text:p><text:span text:style-name="tB">Parsiranje</text:span></text:p>
          <text:p><text:span text:style-name="tS">bus/gen/branch</text:span></text:p>
        </draw:rect>
        <draw:line draw:style-name="arr" svg:x1="8.33cm" svg:y1="9.25cm" svg:x2="8.86cm" svg:y2="9.25cm"/>
        <draw:rect draw:style-name="b_in" draw:corner-radius="0.3cm" svg:x="8.86cm" svg:y="8.0cm" svg:width="3.5cm" svg:height="2.5cm">
          <text:p><text:span text:style-name="tB">Y-bus</text:span></text:p>
          <text:p><text:span text:style-name="tS">natID dense matrica</text:span></text:p>
        </draw:rect>
        <draw:line draw:style-name="arr" svg:x1="12.36cm" svg:y1="9.25cm" svg:x2="12.89cm" svg:y2="9.25cm"/>
        <draw:rect draw:style-name="b_in" draw:corner-radius="0.3cm" svg:x="12.89cm" svg:y="8.0cm" svg:width="3.5cm" svg:height="2.5cm">
          <text:p><text:span text:style-name="tB">Jednačine</text:span></text:p>
          <text:p><text:span text:style-name="tS">strujnog balansa</text:span></text:p>
        </draw:rect>
        <draw:line draw:style-name="arr" svg:x1="16.39cm" svg:y1="9.25cm" svg:x2="16.92cm" svg:y2="9.25cm"/>
        <draw:rect draw:style-name="b_mid" draw:corner-radius="0.3cm" svg:x="16.92cm" svg:y="8.0cm" svg:width="3.5cm" svg:height="2.5cm">
          <text:p><text:span text:style-name="tB">.dmodl</text:span></text:p>
          <text:p><text:span text:style-name="tS">NL model</text:span></text:p>
        </draw:rect>
        <draw:line draw:style-name="arr" svg:x1="20.42cm" svg:y1="9.25cm" svg:x2="20.95cm" svg:y2="9.25cm"/>
        <draw:rect draw:style-name="b_out" draw:corner-radius="0.3cm" svg:x="20.95cm" svg:y="8.0cm" svg:width="3.5cm" svg:height="2.5cm">
          <text:p><text:span text:style-name="tB">dTwin solver</text:span></text:p>
          <text:p><text:span text:style-name="tS">Newton–Raphson</text:span></text:p>
        </draw:rect>
        <draw:line draw:style-name="arr" svg:x1="24.45cm" svg:y1="9.25cm" svg:x2="24.98cm" svg:y2="9.25cm"/>
        <draw:rect draw:style-name="b_out" draw:corner-radius="0.3cm" svg:x="24.98cm" svg:y="8.0cm" svg:width="3.5cm" svg:height="2.5cm">
          <text:p><text:span text:style-name="tB">Naponi</text:span></text:p>
          <text:p><text:span text:style-name="tS">V, δ</text:span></text:p>
        </draw:rect>
        <draw:rect draw:style-name="b_in" svg:x="3cm" svg:y="13cm" svg:width="0.6cm" svg:height="0.6cm"/>
        <draw:frame draw:style-name="lgd" svg:x="3.8cm" svg:y="13cm" svg:width="6cm" svg:height="0.7cm">
          <draw:text-box>
            <text:p>plugin (konverzija)</text:p>
          </draw:text-box>
        </draw:frame>
        <draw:rect draw:style-name="b_mid" svg:x="11cm" svg:y="13cm" svg:width="0.6cm" svg:height="0.6cm"/>
        <draw:frame draw:style-name="lgd" svg:x="11.8cm" svg:y="13cm" svg:width="6cm" svg:height="0.7cm">
          <draw:text-box>
            <text:p>model</text:p>
          </draw:text-box>
        </draw:frame>
        <draw:rect draw:style-name="b_out" svg:x="19cm" svg:y="13cm" svg:width="0.6cm" svg:height="0.6cm"/>
        <draw:frame draw:style-name="lgd" svg:x="19.8cm" svg:y="13cm" svg:width="6cm" svg:height="0.7cm">
          <draw:text-box>
            <text:p>dTwin (rješavanj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styles>
    <draw:marker draw:name="Arr" svg:viewBox="0 0 20 30" svg:d="M10 0 L0 30 L20 30 Z"/>
  </office:styles>
  <office:automatic-styles>
    <style:page-layout style:name="PL0">
      <style:page-layout-properties fo:page-width="29.70cm" fo:page-height="21.00cm" style:print-orientation="landscape" fo:margin="0cm"/>
    </style:page-layout>
  </office:automatic-styles>
  <office:master-styles>
    <style:master-page style:name="Default" style:page-layout-name="PL0"/>
  </office:master-styles>
</office:document-styles>
</file>