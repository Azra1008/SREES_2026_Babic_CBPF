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draw="urn:oasis:names:tc:opendocument:xmlns:drawing:1.0" xmlns:fo="urn:oasis:names:tc:opendocument:xmlns:xsl-fo-compatible:1.0" xmlns:svg="urn:oasis:names:tc:opendocument:xmlns:svg-compatible:1.0" office:version="1.2">
  <office:automatic-styles>
    <style:style style:name="gSlack" style:family="graphic">
      <style:graphic-properties draw:fill="solid" draw:fill-color="#e15759" draw:stroke="solid" svg:stroke-width="0.07cm" svg:stroke-color="#ffffff" draw:textarea-vertical-align="middle"/>
      <style:paragraph-properties fo:text-align="center"/>
      <style:text-properties fo:font-size="13pt" fo:font-weight="bold" fo:color="#ffffff"/>
    </style:style>
    <style:style style:name="gPV" style:family="graphic">
      <style:graphic-properties draw:fill="solid" draw:fill-color="#59a14f" draw:stroke="solid" svg:stroke-width="0.07cm" svg:stroke-color="#ffffff" draw:textarea-vertical-align="middle"/>
      <style:paragraph-properties fo:text-align="center"/>
      <style:text-properties fo:font-size="13pt" fo:font-weight="bold" fo:color="#ffffff"/>
    </style:style>
    <style:style style:name="gPQ" style:family="graphic">
      <style:graphic-properties draw:fill="solid" draw:fill-color="#4e79a7" draw:stroke="solid" svg:stroke-width="0.07cm" svg:stroke-color="#ffffff" draw:textarea-vertical-align="middle"/>
      <style:paragraph-properties fo:text-align="center"/>
      <style:text-properties fo:font-size="13pt" fo:font-weight="bold" fo:color="#ffffff"/>
    </style:style>
    <style:style style:name="gLine" style:family="graphic">
      <style:graphic-properties draw:stroke="solid" svg:stroke-width="0.11cm" svg:stroke-color="#9aa7b4"/>
    </style:style>
    <style:style style:name="gLbl" style:family="graphic">
      <style:graphic-properties draw:fill="none" draw:stroke="none"/>
      <style:paragraph-properties fo:text-align="center"/>
      <style:text-properties fo:font-size="9pt" fo:color="#2f3b4c"/>
    </style:style>
    <style:style style:name="gTitle" style:family="graphic">
      <style:graphic-properties draw:fill="none" draw:stroke="none"/>
      <style:paragraph-properties fo:text-align="center"/>
      <style:text-properties fo:font-size="18pt" fo:font-weight="bold" fo:color="#2f3b4c"/>
    </style:style>
  </office:automatic-styles>
  <office:body>
    <office:drawing>
      <draw:page draw:name="case9" draw:master-page-name="Default">
        <draw:frame draw:style-name="gTitle" svg:x="3.90cm" svg:y="0.2cm" svg:width="21.00cm" svg:height="1cm">
          <draw:text-box>
            <text:p>Jednopolna shema — WSCC 9 (strujni balans)</text:p>
          </draw:text-box>
        </draw:frame>
        <draw:line draw:style-name="gLine" svg:x1="14.40cm" svg:y1="3.60cm" svg:x2="14.40cm" svg:y2="5.40cm"/>
        <draw:line draw:style-name="gLine" svg:x1="14.40cm" svg:y1="5.40cm" svg:x2="9.72cm" svg:y2="8.10cm"/>
        <draw:line draw:style-name="gLine" svg:x1="9.72cm" svg:y1="8.10cm" svg:x2="9.72cm" svg:y2="13.50cm"/>
        <draw:line draw:style-name="gLine" svg:x1="6.45cm" svg:y1="14.85cm" svg:x2="9.72cm" svg:y2="13.50cm"/>
        <draw:line draw:style-name="gLine" svg:x1="9.72cm" svg:y1="13.50cm" svg:x2="14.40cm" svg:y2="16.20cm"/>
        <draw:line draw:style-name="gLine" svg:x1="14.40cm" svg:y1="16.20cm" svg:x2="19.08cm" svg:y2="13.50cm"/>
        <draw:line draw:style-name="gLine" svg:x1="19.08cm" svg:y1="13.50cm" svg:x2="22.35cm" svg:y2="14.85cm"/>
        <draw:line draw:style-name="gLine" svg:x1="19.08cm" svg:y1="13.50cm" svg:x2="19.08cm" svg:y2="8.10cm"/>
        <draw:line draw:style-name="gLine" svg:x1="19.08cm" svg:y1="8.10cm" svg:x2="14.40cm" svg:y2="5.40cm"/>
        <draw:ellipse draw:style-name="gSlack" svg:x="13.53cm" svg:y="2.73cm" svg:width="1.74cm" svg:height="1.74cm">
          <text:p>B1 (G)</text:p>
        </draw:ellipse>
        <draw:frame draw:style-name="gLbl" svg:x="12.30cm" svg:y="1.95cm" svg:width="4.20cm" svg:height="0.6cm">
          <draw:text-box>
            <text:p>1.040 p.u.   δ = +0.0°</text:p>
          </draw:text-box>
        </draw:frame>
        <draw:ellipse draw:style-name="gPV" svg:x="21.48cm" svg:y="13.98cm" svg:width="1.74cm" svg:height="1.74cm">
          <text:p>B2 (G)</text:p>
        </draw:ellipse>
        <draw:frame draw:style-name="gLbl" svg:x="20.25cm" svg:y="15.84cm" svg:width="4.20cm" svg:height="0.6cm">
          <draw:text-box>
            <text:p>1.025 p.u.   δ = +9.3°</text:p>
          </draw:text-box>
        </draw:frame>
        <draw:ellipse draw:style-name="gPV" svg:x="5.58cm" svg:y="13.98cm" svg:width="1.74cm" svg:height="1.74cm">
          <text:p>B3 (G)</text:p>
        </draw:ellipse>
        <draw:frame draw:style-name="gLbl" svg:x="4.35cm" svg:y="15.84cm" svg:width="4.20cm" svg:height="0.6cm">
          <draw:text-box>
            <text:p>1.025 p.u.   δ = +4.7°</text:p>
          </draw:text-box>
        </draw:frame>
        <draw:ellipse draw:style-name="gPQ" svg:x="13.53cm" svg:y="4.53cm" svg:width="1.74cm" svg:height="1.74cm">
          <text:p>B4</text:p>
        </draw:ellipse>
        <draw:frame draw:style-name="gLbl" svg:x="12.30cm" svg:y="6.39cm" svg:width="4.20cm" svg:height="0.6cm">
          <draw:text-box>
            <text:p>1.026 p.u.   δ = -2.2°</text:p>
          </draw:text-box>
        </draw:frame>
        <draw:ellipse draw:style-name="gPQ" svg:x="8.85cm" svg:y="7.23cm" svg:width="1.74cm" svg:height="1.74cm">
          <text:p>B5</text:p>
        </draw:ellipse>
        <draw:frame draw:style-name="gLbl" svg:x="7.62cm" svg:y="9.09cm" svg:width="4.20cm" svg:height="0.6cm">
          <draw:text-box>
            <text:p>1.013 p.u.   δ = -3.7°   ▼90MW</text:p>
          </draw:text-box>
        </draw:frame>
        <draw:ellipse draw:style-name="gPQ" svg:x="8.85cm" svg:y="12.63cm" svg:width="1.74cm" svg:height="1.74cm">
          <text:p>B6</text:p>
        </draw:ellipse>
        <draw:frame draw:style-name="gLbl" svg:x="7.62cm" svg:y="14.49cm" svg:width="4.20cm" svg:height="0.6cm">
          <draw:text-box>
            <text:p>1.032 p.u.   δ = +2.0°</text:p>
          </draw:text-box>
        </draw:frame>
        <draw:ellipse draw:style-name="gPQ" svg:x="13.53cm" svg:y="15.33cm" svg:width="1.74cm" svg:height="1.74cm">
          <text:p>B7</text:p>
        </draw:ellipse>
        <draw:frame draw:style-name="gLbl" svg:x="12.30cm" svg:y="17.19cm" svg:width="4.20cm" svg:height="0.6cm">
          <draw:text-box>
            <text:p>1.016 p.u.   δ = +0.7°   ▼100MW</text:p>
          </draw:text-box>
        </draw:frame>
        <draw:ellipse draw:style-name="gPQ" svg:x="18.21cm" svg:y="12.63cm" svg:width="1.74cm" svg:height="1.74cm">
          <text:p>B8</text:p>
        </draw:ellipse>
        <draw:frame draw:style-name="gLbl" svg:x="16.98cm" svg:y="14.49cm" svg:width="4.20cm" svg:height="0.6cm">
          <draw:text-box>
            <text:p>1.026 p.u.   δ = +3.7°</text:p>
          </draw:text-box>
        </draw:frame>
        <draw:ellipse draw:style-name="gPQ" svg:x="18.21cm" svg:y="7.23cm" svg:width="1.74cm" svg:height="1.74cm">
          <text:p>B9</text:p>
        </draw:ellipse>
        <draw:frame draw:style-name="gLbl" svg:x="16.98cm" svg:y="9.09cm" svg:width="4.20cm" svg:height="0.6cm">
          <draw:text-box>
            <text:p>0.996 p.u.   δ = -4.0°   ▼125MW</text:p>
          </draw:text-box>
        </draw:frame>
        <draw:ellipse draw:style-name="gSlack" svg:x="3.90cm" svg:y="19.50cm" svg:width="0.5cm" svg:height="0.5cm"/>
        <draw:frame draw:style-name="gLbl" svg:x="4.56cm" svg:y="19.50cm" svg:width="5cm" svg:height="0.6cm">
          <draw:text-box>
            <text:p>Slack</text:p>
          </draw:text-box>
        </draw:frame>
        <draw:ellipse draw:style-name="gPV" svg:x="10.50cm" svg:y="19.50cm" svg:width="0.5cm" svg:height="0.5cm"/>
        <draw:frame draw:style-name="gLbl" svg:x="11.16cm" svg:y="19.50cm" svg:width="5cm" svg:height="0.6cm">
          <draw:text-box>
            <text:p>PV (generator)</text:p>
          </draw:text-box>
        </draw:frame>
        <draw:ellipse draw:style-name="gPQ" svg:x="17.10cm" svg:y="19.50cm" svg:width="0.5cm" svg:height="0.5cm"/>
        <draw:frame draw:style-name="gLbl" svg:x="17.76cm" svg:y="19.50cm" svg:width="5cm" svg:height="0.6cm">
          <draw:text-box>
            <text:p>PQ (potrošač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draw="urn:oasis:names:tc:opendocument:xmlns:drawing:1.0" xmlns:fo="urn:oasis:names:tc:opendocument:xmlns:xsl-fo-compatible:1.0" xmlns:svg="urn:oasis:names:tc:opendocument:xmlns:svg-compatible:1.0" office:version="1.2">
  <office:styles/>
  <office:automatic-styles>
    <style:page-layout style:name="PL0">
      <style:page-layout-properties fo:page-width="29.70cm" fo:page-height="21.00cm" style:print-orientation="landscape" fo:margin="0cm"/>
    </style:page-layout>
  </office:automatic-styles>
  <office:master-styles>
    <style:master-page style:name="Default" style:page-layout-name="PL0"/>
  </office:master-styles>
</office:document-styles>
</file>